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DejaVu Sans" fo:font-size="10pt" officeooo:paragraph-rsid="001af889" style:font-size-asian="10pt" style:font-size-complex="10pt"/>
    </style:style>
    <style:style style:name="P4" style:family="paragraph" style:parent-style-name="Standard">
      <style:text-properties style:font-name="DejaVu Sans" fo:font-size="10pt" officeooo:rsid="001af889" officeooo:paragraph-rsid="001af889" style:font-size-asian="10pt" style:font-size-complex="10pt"/>
    </style:style>
    <style:style style:name="P5" style:family="paragraph" style:parent-style-name="Standard">
      <style:text-properties style:font-name="DejaVu Sans" fo:font-size="10pt" officeooo:paragraph-rsid="0017c80f" style:font-size-asian="10pt" style:font-size-complex="10pt"/>
    </style:style>
    <style:style style:name="P6" style:family="paragraph" style:parent-style-name="Standard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c9211e" loext:opacity="100%" style:font-name="DejaVu Sans" fo:font-size="10pt" fo:background-color="transparent" style:font-size-asian="10pt" style:font-size-complex="10pt"/>
    </style:style>
    <style:style style:name="P8" style:family="paragraph" style:parent-style-name="Standard">
      <style:text-properties fo:color="#c9211e" loext:opacity="100%" style:font-name="DejaVu Sans" fo:font-size="10pt" officeooo:paragraph-rsid="001af889" style:font-size-asian="10pt" style:font-size-complex="10pt"/>
    </style:style>
    <style:style style:name="T1" style:family="text">
      <style:text-properties officeooo:rsid="001895ef"/>
    </style:style>
    <style:style style:name="T2" style:family="text">
      <style:text-properties officeooo:rsid="001ad074"/>
    </style:style>
    <style:style style:name="T3" style:family="text">
      <style:text-properties officeooo:rsid="001af889"/>
    </style:style>
    <style:style style:name="T4" style:family="text">
      <style:text-properties officeooo:rsid="001d7552"/>
    </style:style>
    <style:style style:name="T5" style:family="text">
      <style:text-properties officeooo:rsid="002098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TO DE FINANCIAMENTO PARA COMPRA DE <text:span text:style-name="T4">{{NOME_PRODUTO}}</text:span></text:p>
      <text:p text:style-name="P2"/>
      <text:p text:style-name="P1">NÚMERO DO CONTRATO: <text:span text:style-name="T4">{{cod_carne}}</text:span></text:p>
      <text:p text:style-name="P2"/>
      <text:p text:style-name="P2">Este Contrato de Financiamento é celebrado entre as partes abaixo nomeadas, doravante referidas como "Comprador" e "Vendedor", no contexto da aquisição de um <text:span text:style-name="T2">{{</text:span><text:span text:style-name="T5">NOME_PRODUTO</text:span><text:span text:style-name="T2">}}</text:span>, conforme detalhes especificados abaixo:</text:p>
      <text:p text:style-name="P2"/>
      <text:p text:style-name="P1">1. PARTES CONTRATANTES:</text:p>
      <text:p text:style-name="P2"/>
      <text:p text:style-name="P1">Comprador:</text:p>
      <text:p text:style-name="P2">Nome: <text:span text:style-name="T2">{{</text:span><text:span text:style-name="T5">CLIENTE</text:span><text:span text:style-name="T3">}}</text:span></text:p>
      <text:p text:style-name="P7">Endereço: <text:span text:style-name="T3">{{endereco_cliente}}</text:span></text:p>
      <text:p text:style-name="P3">CPF: <text:span text:style-name="T3">{{</text:span><text:span text:style-name="T5">CPF_CLIENTE</text:span><text:span text:style-name="T3">}}</text:span></text:p>
      <text:p text:style-name="P3">Telefone: <text:span text:style-name="T3">{{</text:span><text:span text:style-name="T5">TEL_CEL_CLIENTE</text:span><text:span text:style-name="T3">}}</text:span></text:p>
      <text:p text:style-name="P8">E-mail: <text:span text:style-name="T3">{{email_cliente}}</text:span></text:p>
      <text:p text:style-name="P2"/>
      <text:p text:style-name="P1">Vendedor:</text:p>
      <text:p text:style-name="P2">Nome: <text:span text:style-name="T3">{{empresa}}</text:span></text:p>
      <text:p text:style-name="P2">Endereço: <text:span text:style-name="T3">{{endereco_empresa}}</text:span></text:p>
      <text:p text:style-name="P3">CNPJ: <text:span text:style-name="T3">{{cnpj_empresa}}</text:span></text:p>
      <text:p text:style-name="P3">Telefone: <text:span text:style-name="T3">{{tel_fix_empresa}}</text:span></text:p>
      <text:p text:style-name="P3">E-mail: <text:span text:style-name="T3">{{email_empresa}}</text:span></text:p>
      <text:p text:style-name="P2"/>
      <text:p text:style-name="P1">2. DESCRIÇÃO DO PRODUTO:</text:p>
      <text:p text:style-name="P2"/>
      <text:p text:style-name="P2">O Comprador concorda em adquirir um <text:span text:style-name="T3">{{</text:span><text:span text:style-name="T5">NOME_PRODUTO</text:span><text:span text:style-name="T3">}}</text:span>, detalhado como segue:</text:p>
      <text:p text:style-name="P2">- Descrição: <text:span text:style-name="T3">{{</text:span><text:span text:style-name="T5">DESCRICAO_PRODUTO</text:span><text:span text:style-name="T3">}}</text:span></text:p>
      <text:p text:style-name="P2">- Valor Total: <text:span text:style-name="T3">R${{</text:span><text:span text:style-name="T5">VALOR_TOTAL</text:span><text:span text:style-name="T3">}}</text:span></text:p>
      <text:p text:style-name="P2"/>
      <text:p text:style-name="P1">3. CONDIÇÕES DE PAGAMENTO:</text:p>
      <text:p text:style-name="P2"/>
      <text:p text:style-name="P2">O Comprador efetuará um pagamento inicial (entrada) no valor de <text:span text:style-name="T3">R${{</text:span><text:span text:style-name="T5">VALOR_ENTRADA</text:span><text:span text:style-name="T3">}}</text:span> <text:span text:style-name="T3">({{valor_extenso_entrada}})</text:span> <text:span text:style-name="T1">em </text:span><text:span text:style-name="T3">{{</text:span><text:span text:style-name="T5">TIPO_PAGAMENTO</text:span><text:span text:style-name="T3">}}</text:span>no ato da assinatura deste contrato. O restante do valor, <text:span text:style-name="T3">R${{</text:span><text:span text:style-name="T5">VALOR_RESTANTE</text:span><text:span text:style-name="T3">}}</text:span> (<text:span text:style-name="T3">{{valor_extenso_restante}}</text:span>), será parcelado em <text:span text:style-name="T3">{{</text:span><text:span text:style-name="T5">QUANT_PARCELA</text:span><text:span text:style-name="T3">}}</text:span> (<text:span text:style-name="T3">{{quant_extenso_parcela}}</text:span>) parcelas mensais consecutivas de R$<text:span text:style-name="T3">{{</text:span><text:span text:style-name="T5">VALOR_PARCELA</text:span><text:span text:style-name="T3">}}</text:span> (<text:span text:style-name="T3">{{valor_extenso_parcela}}</text:span>), com o vencimento da primeira parcela ocorrendo no <text:span text:style-name="T3">{{</text:span><text:span text:style-name="T5">DATA_PRIMEIRA_PARCELA</text:span><text:span text:style-name="T3">}}</text:span> e as demais nos meses subsequentes.</text:p>
      <text:p text:style-name="P6"/>
      <text:p text:style-name="P1">4. GARANTIAS:</text:p>
      <text:p text:style-name="P2"/>
      <text:p text:style-name="P2">O Vendedor assegura que o <text:span text:style-name="T3">{{</text:span><text:span text:style-name="T5">NOME_PRODUTO</text:span><text:span text:style-name="T3">}}</text:span> será entregue em conformidade com as especificações acordadas neste contrato. Em caso de não conformidade, o Vendedor compromete-se a corrigir ou substituir o produto, conforme acordado pelas partes.</text:p>
      <text:p text:style-name="P2"/>
      <text:p text:style-name="P1">5. PRAZO DE ENTREGA:</text:p>
      <text:p text:style-name="P2"/>
      <text:p text:style-name="P2">O Vendedor compromete-se a entregar o <text:span text:style-name="T3">{{</text:span><text:span text:style-name="T5">NOME_PRODUTO</text:span><text:span text:style-name="T3">}}</text:span> no prazo de <text:span text:style-name="T3">{{prazo_entrega}}</text:span>, contado a partir da data de confirmação do pagamento da entrada.</text:p>
      <text:p text:style-name="P2"/>
      <text:p text:style-name="P1">6. RESCISÃO:</text:p>
      <text:p text:style-name="P2"/>
      <text:p text:style-name="P2">Qualquer das partes poderá rescindir este contrato mediante aviso prévio por escrito, caso a outra parte descumpra as condições estabelecidas neste documento.</text:p>
      <text:p text:style-name="P2"/>
      <text:p text:style-name="P1">7. LEI APLICÁVEL:</text:p>
      <text:p text:style-name="P2"/>
      <text:p text:style-name="P2">Este contrato será regido e interpretado de acordo com as leis vigentes do Brasil.</text:p>
      <text:p text:style-name="P2"/>
      <text:p text:style-name="P2">As partes, de comum acordo, assinam este Contrato de Financiamento em duas vias de igual teor, na presença de testemunhas, para que produza os efeitos legais.</text:p>
      <text:p text:style-name="P2"/>
      <text:p text:style-name="P2"><text:soft-page-break/></text:p>
      <text:p text:style-name="P4">{{local}} e {{data}}</text:p>
      <text:p text:style-name="P2"/>
      <text:p text:style-name="P2">______________________________</text:p>
      <text:p text:style-name="P2">[Assinatura do Comprador]</text:p>
      <text:p text:style-name="P2"/>
      <text:p text:style-name="P2">______________________________</text:p>
      <text:p text:style-name="P2">[Assinatura do Vendedor]</text:p>
      <text:p text:style-name="P2"/>
      <text:p text:style-name="P1">Testemunhas:</text:p>
      <text:p text:style-name="P2"/>
      <text:p text:style-name="P2">1. ______________________________</text:p>
      <text:p text:style-name="P2"><text:s text:c="3"/>Nome:</text:p>
      <text:p text:style-name="P2"><text:s text:c="3"/>CPF:</text:p>
      <text:p text:style-name="P2"/>
      <text:p text:style-name="P2">2. ______________________________</text:p>
      <text:p text:style-name="P2"><text:s text:c="3"/>Nome:</text:p>
      <text:p text:style-name="P5"><text:s text:c="3"/>CPF: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6:48:09.165497801</meta:creation-date>
    <dc:date>2024-01-06T09:22:47.891889922</dc:date>
    <meta:editing-duration>PT2H16M14S</meta:editing-duration>
    <meta:editing-cycles>10</meta:editing-cycles>
    <meta:generator>LibreOffice/7.0.4.2$Linux_X86_64 LibreOffice_project/00$Build-2</meta:generator>
    <meta:print-date>2023-12-11T17:11:49.765641067</meta:print-date>
    <meta:document-statistic meta:table-count="0" meta:image-count="0" meta:object-count="0" meta:page-count="2" meta:paragraph-count="43" meta:word-count="289" meta:character-count="2370" meta:non-whitespace-character-count="2112"/>
  </office:meta>
</office:document-meta>
</file>