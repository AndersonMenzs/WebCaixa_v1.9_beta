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4292c" officeooo:paragraph-rsid="00042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CLIENTE}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1-06T10:09:57.380411327</dc:date>
    <meta:editing-duration>PT2M42S</meta:editing-duration>
    <meta:editing-cycles>5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